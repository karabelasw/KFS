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 think we're in a very good place. The project has evolved from "let's build a Spring Boot application" into having a fairly well-defined architecture.</text:p>
      <text:p text:style-name="Text_20_body">Here's where I think we stand.</text:p>
      <text:h text:style-name="Heading_20_3" text:outline-level="3">1. Vision and Purpose ✓</text:h>
      <text:p text:style-name="Text_20_body">We settled on the mission statement:</text:p>
      <text:p text:style-name="Quotations"><text:span text:style-name="Strong_20_Emphasis">KFS exists as a software development exercise as well as an experiment in using AI to assist with the effort in design and implementation of KFS.</text:span></text:p>
      <text:p text:style-name="Text_20_body">More importantly, we defined what KFS actually is.</text:p>
      <text:p text:style-name="Text_20_body">A <text:span text:style-name="Strong_20_Emphasis">Knowledge Base</text:span> is the root (seed) of a tree of knowledge.</text:p>
      <text:p text:style-name="Text_20_body">A user can own <text:span text:style-name="Strong_20_Emphasis">an unlimited number of Knowledge Bases</text:span>, each representing a completely different subject.</text:p>
      <text:p text:style-name="Text_20_body">For example:</text:p>
      <text:p text:style-name="Preformatted_20_Text"><text:span text:style-name="Source_20_Text">Billy</text:span></text:p>
      <text:p text:style-name="Preformatted_20_Text"><text:span text:style-name="Source_20_Text">│</text:span></text:p>
      <text:p text:style-name="Preformatted_20_Text"><text:span text:style-name="Source_20_Text">├── Motorcycles</text:span></text:p>
      <text:p text:style-name="Preformatted_20_Text"><text:span text:style-name="Source_20_Text">│ <text:s text:c="2"/>├── BMW</text:span></text:p>
      <text:p text:style-name="Preformatted_20_Text"><text:span text:style-name="Source_20_Text">│ <text:s text:c="2"/>├── Honda</text:span></text:p>
      <text:p text:style-name="Preformatted_20_Text"><text:span text:style-name="Source_20_Text">│ <text:s text:c="2"/>└── Maintenance</text:span></text:p>
      <text:p text:style-name="Preformatted_20_Text"><text:span text:style-name="Source_20_Text">│</text:span></text:p>
      <text:p text:style-name="Preformatted_20_Text"><text:span text:style-name="Source_20_Text">├── Home</text:span></text:p>
      <text:p text:style-name="Preformatted_20_Text"><text:span text:style-name="Source_20_Text">│ <text:s text:c="2"/>├── Plumbing</text:span></text:p>
      <text:p text:style-name="Preformatted_20_Text"><text:span text:style-name="Source_20_Text">│ <text:s text:c="2"/>├── Electrical</text:span></text:p>
      <text:p text:style-name="Preformatted_20_Text"><text:span text:style-name="Source_20_Text">│ <text:s text:c="2"/>└── Deck</text:span></text:p>
      <text:p text:style-name="Preformatted_20_Text"><text:span text:style-name="Source_20_Text">│</text:span></text:p>
      <text:p text:style-name="Preformatted_20_Text"><text:span text:style-name="Source_20_Text">├── Retirement</text:span></text:p>
      <text:p text:style-name="Preformatted_20_Text"><text:span text:style-name="Source_20_Text">│</text:span></text:p>
      <text:p text:style-name="Preformatted_20_Text"><text:span text:style-name="Source_20_Text">├── Teaching</text:span></text:p>
      <text:p text:style-name="Preformatted_20_Text"><text:span text:style-name="Source_20_Text">│</text:span></text:p>
      <text:p text:style-name="P2"><text:span text:style-name="Source_20_Text">└── Family History</text:span></text:p>
      <text:p text:style-name="Text_20_body">That concept is much stronger than simply having folders.</text:p>
      <text:p text:style-name="Horizontal_20_Line"/>
      <text:h text:style-name="Heading_20_2" text:outline-level="2">2. Technology Stack ✓</text:h>
      <text:p text:style-name="Text_20_body">We agreed on</text:p>
      <text:list xml:id="list188265042" text:style-name="L1">
        <text:list-item>
          <text:p text:style-name="P3">Java 17</text:p>
        </text:list-item>
        <text:list-item>
          <text:p text:style-name="P3">Spring Boot 4</text:p>
        </text:list-item>
        <text:list-item>
          <text:p text:style-name="P3">Spring MVC</text:p>
        </text:list-item>
        <text:list-item>
          <text:p text:style-name="P3">Thymeleaf</text:p>
        </text:list-item>
        <text:list-item>
          <text:p text:style-name="P3">Bootstrap</text:p>
        </text:list-item>
        <text:list-item>
          <text:p text:style-name="P3"><text:soft-page-break/>MySQL</text:p>
        </text:list-item>
        <text:list-item>
          <text:p text:style-name="P3">JPA/Hibernate</text:p>
        </text:list-item>
        <text:list-item>
          <text:p text:style-name="P3">Maven</text:p>
        </text:list-item>
      </text:list>
      <text:p text:style-name="Horizontal_20_Line"/>
      <text:h text:style-name="Heading_20_2" text:outline-level="2">3. Architecture ✓</text:h>
      <text:p text:style-name="Text_20_body">We decided against creating dozens of tables like</text:p>
      <text:p text:style-name="Preformatted_20_Text"><text:span text:style-name="Source_20_Text">Recipes</text:span></text:p>
      <text:p text:style-name="Preformatted_20_Text"><text:span text:style-name="Source_20_Text">Vehicles</text:span></text:p>
      <text:p text:style-name="Preformatted_20_Text"><text:span text:style-name="Source_20_Text">Poems</text:span></text:p>
      <text:p text:style-name="Preformatted_20_Text"><text:span text:style-name="Source_20_Text">Projects</text:span></text:p>
      <text:p text:style-name="Preformatted_20_Text"><text:span text:style-name="Source_20_Text">Investments</text:span></text:p>
      <text:p text:style-name="Preformatted_20_Text"><text:span text:style-name="Source_20_Text">Movies</text:span></text:p>
      <text:p text:style-name="P2"><text:span text:style-name="Source_20_Text">Books</text:span></text:p>
      <text:p text:style-name="Text_20_body">Instead, we discussed a <text:span text:style-name="Strong_20_Emphasis">generic content model</text:span>.</text:p>
      <text:p text:style-name="Preformatted_20_Text"><text:span text:style-name="Source_20_Text">KnowledgeBase</text:span></text:p>
      <text:p text:style-name="Preformatted_20_Text"><text:span text:style-name="Source_20_Text"><text:s text:c="8"/>│</text:span></text:p>
      <text:p text:style-name="Preformatted_20_Text"><text:span text:style-name="Source_20_Text"><text:s text:c="6"/>Category</text:span></text:p>
      <text:p text:style-name="Preformatted_20_Text"><text:span text:style-name="Source_20_Text"><text:s text:c="8"/>│</text:span></text:p>
      <text:p text:style-name="Preformatted_20_Text"><text:span text:style-name="Source_20_Text"><text:s text:c="6"/>Content</text:span></text:p>
      <text:p text:style-name="Preformatted_20_Text"><text:span text:style-name="Source_20_Text"><text:s text:c="8"/>│</text:span></text:p>
      <text:p text:style-name="Preformatted_20_Text"><text:span text:style-name="Source_20_Text"><text:s/>┌──────┼───────────┐</text:span></text:p>
      <text:p text:style-name="Preformatted_20_Text"><text:span text:style-name="Source_20_Text"><text:s/>│ <text:s text:c="5"/>│ <text:s text:c="10"/>│</text:span></text:p>
      <text:p text:style-name="P2"><text:span text:style-name="Source_20_Text">Images Attachments Comments</text:span></text:p>
      <text:p text:style-name="Text_20_body">Then only create specialized tables <text:span text:style-name="Strong_20_Emphasis">when absolutely necessary.</text:span></text:p>
      <text:p text:style-name="Text_20_body">That decision will keep KFS maintainable for years.</text:p>
      <text:p text:style-name="Horizontal_20_Line"/>
      <text:h text:style-name="Heading_20_2" text:outline-level="2">4. Shared Administrative Fields ✓</text:h>
      <text:p text:style-name="Text_20_body">We discussed every entity having common fields such as</text:p>
      <text:p text:style-name="Preformatted_20_Text"><text:span text:style-name="Source_20_Text">id</text:span></text:p>
      <text:p text:style-name="Preformatted_20_Text"/>
      <text:p text:style-name="Preformatted_20_Text"><text:span text:style-name="Source_20_Text">created_by</text:span></text:p>
      <text:p text:style-name="Preformatted_20_Text"><text:span text:style-name="Source_20_Text">created_date</text:span></text:p>
      <text:p text:style-name="Preformatted_20_Text"/>
      <text:p text:style-name="Preformatted_20_Text"><text:span text:style-name="Source_20_Text">updated_by</text:span></text:p>
      <text:p text:style-name="Preformatted_20_Text"><text:span text:style-name="Source_20_Text">updated_date</text:span></text:p>
      <text:p text:style-name="Preformatted_20_Text"/>
      <text:p text:style-name="Preformatted_20_Text"><text:span text:style-name="Source_20_Text">deleted</text:span></text:p>
      <text:p text:style-name="Preformatted_20_Text"/>
      <text:p text:style-name="P2"><text:span text:style-name="Source_20_Text">version</text:span></text:p>
      <text:p text:style-name="Text_20_body">This becomes your foundation.</text:p>
      <text:p text:style-name="Horizontal_20_Line"/>
      <text:h text:style-name="Heading_20_2" text:outline-level="2"><text:soft-page-break/>5. Spring Boot Layout ✓</text:h>
      <text:p text:style-name="Text_20_body">We worked through</text:p>
      <text:list xml:id="list1516517114" text:style-name="L2">
        <text:list-item>
          <text:p text:style-name="P4">navbar fragments</text:p>
        </text:list-item>
        <text:list-item>
          <text:p text:style-name="P4">layout.html</text:p>
        </text:list-item>
        <text:list-item>
          <text:p text:style-name="P4">Thymeleaf fragments</text:p>
        </text:list-item>
        <text:list-item>
          <text:p text:style-name="P4">Bootstrap</text:p>
        </text:list-item>
        <text:list-item>
          <text:p text:style-name="P4">CSS loading</text:p>
        </text:list-item>
        <text:list-item>
          <text:p text:style-name="P4">navigation</text:p>
        </text:list-item>
      </text:list>
      <text:p text:style-name="Text_20_body">Your UI foundation is basically ready.</text:p>
      <text:p text:style-name="Horizontal_20_Line"/>
      <text:h text:style-name="Heading_20_2" text:outline-level="2">6. Database</text:h>
      <text:p text:style-name="Text_20_body">This is where I think we paused.</text:p>
      <text:p text:style-name="Text_20_body">I had started recommending we stop thinking about individual tables and instead design the <text:span text:style-name="Strong_20_Emphasis">entire database from the top down</text:span>.</text:p>
      <text:p text:style-name="Text_20_body">I believe the first entities should be something like</text:p>
      <text:p text:style-name="Preformatted_20_Text"><text:span text:style-name="Source_20_Text">User</text:span></text:p>
      <text:p text:style-name="Preformatted_20_Text"><text:span text:style-name="Source_20_Text">KnowledgeBase</text:span></text:p>
      <text:p text:style-name="Preformatted_20_Text"><text:span text:style-name="Source_20_Text">Category</text:span></text:p>
      <text:p text:style-name="Preformatted_20_Text"><text:span text:style-name="Source_20_Text">Content</text:span></text:p>
      <text:p text:style-name="Preformatted_20_Text"><text:span text:style-name="Source_20_Text">Tag</text:span></text:p>
      <text:p text:style-name="Preformatted_20_Text"><text:span text:style-name="Source_20_Text">Attachment</text:span></text:p>
      <text:p text:style-name="Preformatted_20_Text"><text:span text:style-name="Source_20_Text">Image</text:span></text:p>
      <text:p text:style-name="P2"><text:span text:style-name="Source_20_Text">Comment</text:span></text:p>
      <text:p text:style-name="Text_20_body">Everything else grows from there.</text:p>
      <text:p text:style-name="Horizontal_20_Line"/>
      <text:h text:style-name="Heading_20_1" text:outline-level="1"/>
      <text:h text:style-name="P1" text:outline-level="1">Where I think we should go next</text:h>
      <text:p text:style-name="Text_20_body">This is the part I'm excited about.</text:p>
      <text:p text:style-name="Text_20_body">Rather than immediately writing SQL, I think we should design the <text:span text:style-name="Strong_20_Emphasis">domain model</text:span> first.</text:p>
      <text:p text:style-name="Text_20_body">Something like:</text:p>
      <text:p text:style-name="Preformatted_20_Text"><text:span text:style-name="Source_20_Text">User</text:span></text:p>
      <text:p text:style-name="Preformatted_20_Text"><text:span text:style-name="Source_20_Text"><text:s/>├── KnowledgeBases</text:span></text:p>
      <text:p text:style-name="Preformatted_20_Text"><text:span text:style-name="Source_20_Text"><text:s/>│ <text:s text:c="5"/>├── Categories</text:span></text:p>
      <text:p text:style-name="Preformatted_20_Text"><text:span text:style-name="Source_20_Text"><text:s/>│ <text:s text:c="5"/>│ <text:s text:c="5"/>├── Content</text:span></text:p>
      <text:p text:style-name="Preformatted_20_Text"><text:span text:style-name="Source_20_Text"><text:s/>│ <text:s text:c="5"/>│ <text:s text:c="5"/>│ <text:s text:c="5"/>├── Images</text:span></text:p>
      <text:p text:style-name="Preformatted_20_Text"><text:span text:style-name="Source_20_Text"><text:s/>│ <text:s text:c="5"/>│ <text:s text:c="5"/>│ <text:s text:c="5"/>├── Attachments</text:span></text:p>
      <text:p text:style-name="Preformatted_20_Text"><text:span text:style-name="Source_20_Text"><text:s/>│ <text:s text:c="5"/>│ <text:s text:c="5"/>│ <text:s text:c="5"/>├── Comments</text:span></text:p>
      <text:p text:style-name="Preformatted_20_Text"><text:span text:style-name="Source_20_Text"><text:s/>│ <text:s text:c="5"/>│ <text:s text:c="5"/>│ <text:s text:c="5"/>└── Tags</text:span></text:p>
      <text:p text:style-name="Preformatted_20_Text"><text:span text:style-name="Source_20_Text"><text:s/>│ <text:s text:c="5"/>│ <text:s text:c="5"/>└── Categories...</text:span></text:p>
      <text:p text:style-name="Preformatted_20_Text"><text:span text:style-name="Source_20_Text"><text:s/>│ <text:s text:c="5"/>└── Categories...</text:span></text:p>
      <text:p text:style-name="P2"><text:span text:style-name="Source_20_Text"><text:s/>└── KnowledgeBases...</text:span></text:p>
      <text:p text:style-name="Text_20_body">Once we're satisfied with that hierarchy, the SQL almost writes itself.</text:p>
      <text:p text:style-name="Horizontal_20_Line"/>
      <text:h text:style-name="Heading_20_1" text:outline-level="1">After that</text:h>
      <text:p text:style-name="Text_20_body">I would generate the project in this order:</text:p>
      <text:list xml:id="list3768917662" text:style-name="L3">
        <text:list-item>
          <text:p text:style-name="P5">Complete ERD (Entity Relationship Diagram)</text:p>
        </text:list-item>
        <text:list-item>
          <text:p text:style-name="P5">Complete MySQL DDL</text:p>
        </text:list-item>
        <text:list-item>
          <text:p text:style-name="P5">JPA entities</text:p>
        </text:list-item>
        <text:list-item>
          <text:p text:style-name="P5">Repositories</text:p>
        </text:list-item>
        <text:list-item>
          <text:p text:style-name="P5">Services</text:p>
        </text:list-item>
        <text:list-item>
          <text:p text:style-name="P5">Controllers</text:p>
        </text:list-item>
        <text:list-item>
          <text:p text:style-name="P5">Thymeleaf pages</text:p>
        </text:list-item>
        <text:list-item>
          <text:p text:style-name="P5">Search</text:p>
        </text:list-item>
        <text:list-item>
          <text:p text:style-name="P5">File upload</text:p>
        </text:list-item>
        <text:list-item>
          <text:p text:style-name="P5">AI integration</text:p>
        </text:list-item>
      </text:list>
      <text:p text:style-name="Horizontal_20_Line"/>
      <text:h text:style-name="Heading_20_2" text:outline-level="2"><text:soft-page-break/>One thing I'd like to add</text:h>
      <text:p text:style-name="Text_20_body">As we've talked, I've come to think of KFS less as a "file system" and more as a <text:span text:style-name="Strong_20_Emphasis">personal knowledge management system</text:span>. The name still works—it's your <text:span text:style-name="Emphasis">Karabelas File System</text:span>—but the underlying model is richer. You're not just storing files; you're building a living, interconnected forest of knowledge where each Knowledge Base grows independently, with categories, content, tags, attachments, and relationships that can evolve over time.</text:p>
      <text:p text:style-name="Text_20_body">I think the next major milestone should be producing a <text:span text:style-name="Strong_20_Emphasis">complete ERD</text:span>. Once that diagram is right, everything else—DDL, JPA entities, repositories, and the application itself—will follow from a solid foundation rather than being designed incrementally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4T12:41:54.254207269</meta:creation-date>
    <dc:date>2026-07-06T09:00:23.081604544</dc:date>
    <meta:editing-duration>P1DT20H8M28S</meta:editing-duration>
    <meta:editing-cycles>1</meta:editing-cycles>
    <meta:document-statistic meta:table-count="0" meta:image-count="0" meta:object-count="0" meta:page-count="5" meta:paragraph-count="121" meta:word-count="568" meta:character-count="3458" meta:non-whitespace-character-count="2874"/>
    <meta:generator>LibreOffice/7.3.7.2$Linux_X86_64 LibreOffice_project/30$Build-2</meta:generator>
  </office:meta>
</office:document-meta>
</file>