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Karabelas File System (KFS)</text:h>
      <text:h text:style-name="Heading_20_2" text:outline-level="2">Mission Statement</text:h>
      <text:p text:style-name="Text_20_body">The <text:span text:style-name="Strong_20_Emphasis">Karabelas File System (KFS)</text:span> is a personal knowledge management platform designed to collect, organize, preserve, and share knowledge, experiences, ideas, and information across every aspect of life.</text:p>
      <text:p text:style-name="Text_20_body">Its purpose is to serve as a lifelong repository where anything of value can be documented, referenced, expanded upon, and rediscovered. Whether the subject is a favorite poem, a home improvement project, a motorcycle adventure, an investment strategy, a vehicle maintenance record, a philosophical thought, or a recipe, KFS provides a single place where knowledge can be captured and allowed to grow over time.</text:p>
      <text:p text:style-name="Text_20_body">KFS is intentionally unrestricted in scope. There are no predefined limits on the kinds of information it can contain. Knowledge may relate to tangible objects such as automobiles, motorcycles, tools, or property, or to intangible subjects such as process improvement, mathematics, philosophy, history, education, personal reflection, creativity, or future ideas. If it is meaningful enough to preserve, it belongs in KFS.</text:p>
      <text:p text:style-name="Text_20_body">Beyond simple storage, KFS encourages continuous learning and refinement. Information is not considered static; it evolves through new experiences, additional research, personal insights, and ongoing revision. Every entry represents an opportunity to document what has been learned, reflect upon it, improve it, and preserve it for future reference.</text:p>
      <text:p text:style-name="Text_20_body">KFS also serves as a historical archive. It captures not only information, but the experiences, projects, discoveries, successes, failures, and lessons that shape a person's life. Over time, it becomes a living record of accumulated knowledge and personal growth.</text:p>
      <text:p text:style-name="Text_20_body">While KFS is fundamentally a personal repository, it is also designed to support sharing. Each individual maintains ownership of their own Knowledge Base and determines what information remains private, what is shared with family members, and what may be made available to a broader audience. In this way, KFS becomes a means of preserving knowledge across generations while respecting individual ownership and privacy.</text:p>
      <text:p text:style-name="Text_20_body">Ultimately, the purpose of the Karabelas File System is to provide a permanent, organized, searchable, and evolving home for knowledge—one that grows alongside its owner and preserves a lifetime of ideas, experiences, and wisdom for both personal enrichment and future generation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1T07:46:31.695735723</meta:creation-date>
    <dc:date>2026-07-01T07:57:12.357878552</dc:date>
    <meta:editing-duration>PT30S</meta:editing-duration>
    <meta:editing-cycles>1</meta:editing-cycles>
    <meta:document-statistic meta:table-count="0" meta:image-count="0" meta:object-count="0" meta:page-count="1" meta:paragraph-count="9" meta:word-count="351" meta:character-count="2391" meta:non-whitespace-character-count="2050"/>
    <meta:generator>LibreOffice/7.3.7.2$Linux_X86_64 LibreOffice_project/30$Build-2</meta:generator>
  </office:meta>
</office:document-meta>
</file>