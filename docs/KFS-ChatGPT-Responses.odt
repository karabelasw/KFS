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<text:span text:style-name="Strong_20_Emphasis">The Karabelas File System (KFS) is being developed as both a practical software application and a long-term software engineering exercise. It serves as an opportunity to explore modern software architecture, database design, object-oriented programming, and knowledge management while simultaneously evaluating the effectiveness of artificial intelligence as a collaborative partner in the design, implementation, documentation, and evolution of a complex software system.</text:span></text:p>
      <text:p text:style-name="Text_20_body"><text:span text:style-name="Strong_20_Emphasis">KFS is therefore both a product and an experiment. Its success will be measured not only by the usefulness of the application itself, but also by the knowledge gained throughout its design and development.</text:span></text:p>
      <text:p text:style-name="Text_20_body">KFS exists as a software development exercise as well as an experiment in using AI to assist with the effort in design and implementation of KFS.</text:p>
      <text:p text:style-name="Text_20_body"/>
      <text:p text:style-name="Text_20_body">Over the last several weeks, we've established some fundamental principles:</text:p>
      <text:p text:style-name="Text_20_body">✓ KFS is <text:span text:style-name="Strong_20_Emphasis">not</text:span> a recipe application.</text:p>
      <text:p text:style-name="Text_20_body">✓ KFS is a <text:span text:style-name="Strong_20_Emphasis">Personal Knowledge Management System</text:span>.</text:p>
      <text:p text:style-name="Text_20_body">✓ Every user owns one (or possibly more) <text:span text:style-name="Strong_20_Emphasis">Knowledge Bases</text:span>.</text:p>
      <text:p text:style-name="Text_20_body">✓ A Knowledge Base contains many <text:span text:style-name="Strong_20_Emphasis">Items</text:span>.</text:p>
      <text:p text:style-name="Text_20_body">✓ Recipes, Vehicles, Home Maintenance, Investments, etc. are <text:span text:style-name="Strong_20_Emphasis">Item Types</text:span> (or at least top-level domain entities within the Knowledge Base).</text:p>
      <text:p text:style-name="Text_20_body">✓ Images, files, comments, and tags are <text:span text:style-name="Strong_20_Emphasis">shared capabilities</text:span>.</text:p>
      <text:p text:style-name="Text_20_body">✓ Visibility is part of the domain.</text:p>
      <text:p text:style-name="Text_20_body">✓ Every entity has common administrative fields.</text:p>
      <text:p text:style-name="Text_20_body">✓ The architecture is feature-based, not layered by technology.</text:p>
      <text:p text:style-name="Text_20_body">Those are major architectural decision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3T08:27:40.151489413</meta:creation-date>
    <dc:date>2026-07-06T08:29:36.923717326</dc:date>
    <meta:editing-duration>P2DT18H51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20" meta:character-count="1458" meta:non-whitespace-character-count="1252"/>
  </office:meta>
</office:document-meta>
</file>