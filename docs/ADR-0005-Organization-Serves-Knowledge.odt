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DR-0005</text:h>
      <text:h text:style-name="Heading_20_3" text:outline-level="3">Title</text:h>
      <text:p text:style-name="Text_20_body"><text:span text:style-name="Strong_20_Emphasis">Organization Serves Knowledge</text:span></text:p>
      <text:h text:style-name="Heading_20_3" text:outline-level="3">Decision</text:h>
      <text:p text:style-name="Text_20_body">The primary purpose of KFS is to preserve knowledge.</text:p>
      <text:p text:style-name="Text_20_body">Nodes exist to organize knowledge.</text:p>
      <text:p text:style-name="Text_20_body">Knowledge Bases exist to group organized knowledge.</text:p>
      <text:p text:style-name="Text_20_body">Relationships exist to connect knowledge.</text:p>
      <text:p text:style-name="Text_20_body">The user interface should always optimize for capturing knowledge first while allowing organization to evolve over time.</text:p>
      <text:h text:style-name="Heading_20_3" text:outline-level="3">Consequences</text:h>
      <text:list xml:id="list3428018270" text:style-name="L1">
        <text:list-item>
          <text:p text:style-name="P2">Fast capture is always possible. </text:p>
        </text:list-item>
        <text:list-item>
          <text:p text:style-name="P2">Organization can be refined later. </text:p>
        </text:list-item>
        <text:list-item>
          <text:p text:style-name="P2">The hierarchy remains flexible. </text:p>
        </text:list-item>
        <text:list-item>
          <text:p text:style-name="P2">AI assists organization but never replaces the user's judgment. </text:p>
        </text:list-item>
        <text:list-item>
          <text:p text:style-name="P1">The domain remains simple while supporting increasingly sophisticated knowledge structur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08:54:36.329575317</meta:creation-date>
    <dc:date>2026-07-06T08:59:01.223279403</dc:date>
    <meta:editing-duration>PT4M25S</meta:editing-duration>
    <meta:editing-cycles>1</meta:editing-cycles>
    <meta:document-statistic meta:table-count="0" meta:image-count="0" meta:object-count="0" meta:page-count="1" meta:paragraph-count="15" meta:word-count="88" meta:character-count="620" meta:non-whitespace-character-count="548"/>
    <meta:generator>LibreOffice/7.3.7.2$Linux_X86_64 LibreOffice_project/30$Build-2</meta:generator>
  </office:meta>
</office:document-meta>
</file>