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.3937in" fo:text-indent="0in" style:auto-text-indent="false"/>
      <style:text-properties officeooo:rsid="00054b34" officeooo:paragraph-rsid="00054b34"/>
    </style:style>
    <style:style style:name="P2" style:family="paragraph" style:parent-style-name="Standard">
      <style:text-properties officeooo:rsid="00054b34" officeooo:paragraph-rsid="00054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trong_20_Emphasis">Architecture Decision Record - 0006</text:span></text:p>
      <text:p text:style-name="P1">KFS will use a feature-oriented Java package structure. Packages will represent cohesive application concepts rather than technical layers. Classes that collaborate to implement a feature (entities, repositories, services, controllers, DTOs) will reside together within that feature package. Shared infrastructure concerns will remain in dedicated common packages.</text:p>
      <text:p text:style-name="P1"><text:span text:style-name="Strong_20_Emphasis">Packages represent cohesive business responsibilities, not technical implementation layers.</text:span></text:p>
      <text:p text:style-name="P2"/>
      <text:p text:style-name="Standard">ADR-0006</text:p>
      <text:p text:style-name="Standard">Title: Package Organization</text:p>
      <text:p text:style-name="Standard"/>
      <text:p text:style-name="Standard">Status</text:p>
      <text:p text:style-name="Standard">Accepted</text:p>
      <text:p text:style-name="Standard"/>
      <text:p text:style-name="Standard">Context</text:p>
      <text:p text:style-name="Standard"/>
      <text:p text:style-name="Standard">KFS is expected to grow over many years.</text:p>
      <text:p text:style-name="Standard">Traditional layered packages separate entities,</text:p>
      <text:p text:style-name="Standard">repositories, services, and controllers into</text:p>
      <text:p text:style-name="Standard">different directories.</text:p>
      <text:p text:style-name="Standard"/>
      <text:p text:style-name="Standard">This makes it difficult to understand a single</text:p>
      <text:p text:style-name="Standard">business capability.</text:p>
      <text:p text:style-name="Standard"/>
      <text:p text:style-name="Standard">Decision</text:p>
      <text:p text:style-name="Standard"/>
      <text:p text:style-name="Standard">KFS will organize code by cohesive business</text:p>
      <text:p text:style-name="Standard">responsibility (feature).</text:p>
      <text:p text:style-name="Standard"/>
      <text:p text:style-name="Standard">Each feature package may contain its entities,</text:p>
      <text:p text:style-name="Standard">repositories, services, controllers, DTOs, and</text:p>
      <text:p text:style-name="Standard">validators.</text:p>
      <text:p text:style-name="Standard"/>
      <text:p text:style-name="Standard">Consequences</text:p>
      <text:p text:style-name="Standard"/>
      <text:p text:style-name="Standard">Advantages</text:p>
      <text:p text:style-name="Standard">- Better cohesion</text:p>
      <text:p text:style-name="Standard">- Easier navigation</text:p>
      <text:p text:style-name="Standard">- Supports vertical feature development</text:p>
      <text:p text:style-name="Standard"/>
      <text:p text:style-name="Standard">Disadvantages</text:p>
      <text:p text:style-name="Standard">- Some shared infrastructure requires careful placement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com.kfs</text:p>
      <text:p text:style-name="Standard"/>
      <text:p text:style-name="Standard"><text:s text:c="4"/>knowledgebase</text:p>
      <text:p text:style-name="Standard"><text:s text:c="8"/>KnowledgeBase.java</text:p>
      <text:p text:style-name="Standard"><text:s text:c="8"/>KnowledgeBaseRepository.java</text:p>
      <text:p text:style-name="Standard"><text:s text:c="8"/>KnowledgeBaseService.java</text:p>
      <text:p text:style-name="Standard"><text:s text:c="8"/>KnowledgeBaseController.java</text:p>
      <text:p text:style-name="Standard"/>
      <text:p text:style-name="Standard"><text:s text:c="4"/>entry</text:p>
      <text:p text:style-name="Standard"><text:s text:c="8"/>Entry.java</text:p>
      <text:p text:style-name="Standard"><text:s text:c="8"/>EntryRepository.java</text:p>
      <text:p text:style-name="Standard"><text:s text:c="8"/>EntryService.java</text:p>
      <text:p text:style-name="Standard"><text:s text:c="8"/>EntryController.java</text:p>
      <text:p text:style-name="Standard"/>
      <text:p text:style-name="Standard"><text:s text:c="4"/>node</text:p>
      <text:p text:style-name="Standard"><text:s text:c="8"/>Node.java</text:p>
      <text:p text:style-name="Standard"><text:s text:c="8"/>NodeRepository.java</text:p>
      <text:p text:style-name="Standard"><text:s text:c="8"/>NodeService.java</text:p>
      <text:p text:style-name="Standard"><text:s text:c="8"/>NodeController.java</text:p>
      <text:p text:style-name="Standard"/>
      <text:p text:style-name="Standard"><text:s text:c="4"/>relationship</text:p>
      <text:p text:style-name="Standard"><text:s text:c="8"/>Relationship.java</text:p>
      <text:p text:style-name="Standard"><text:s text:c="8"/>RelationshipRepository.java</text:p>
      <text:p text:style-name="Standard"><text:s text:c="8"/>RelationshipService.java</text:p>
      <text:p text:style-name="Standard"/>
      <text:p text:style-name="Standard"><text:s text:c="4"/>inbox</text:p>
      <text:p text:style-name="Standard"><text:s text:c="8"/>InboxService.java</text:p>
      <text:p text:style-name="Standard"><text:s text:c="8"/>InboxController.java</text:p>
      <text:p text:style-name="Standard"/>
      <text:p text:style-name="Standard"><text:s text:c="4"/>search</text:p>
      <text:p text:style-name="Standard"><text:s text:c="8"/>SearchService.java</text:p>
      <text:p text:style-name="Standard"><text:s text:c="8"/>SearchController.java</text:p>
      <text:p text:style-name="Standard"/>
      <text:p text:style-name="Standard"><text:s text:c="4"/>reference</text:p>
      <text:p text:style-name="Standard"><text:s text:c="8"/>EntryStatus.java</text:p>
      <text:p text:style-name="Standard"><text:s text:c="8"/>EntryStatusRepository.java</text:p>
      <text:p text:style-name="Standard"><text:s text:c="8"/>ContentType.java</text:p>
      <text:p text:style-name="Standard"/>
      <text:p text:style-name="Standard"><text:s text:c="4"/>security</text:p>
      <text:p text:style-name="Standard"><text:s text:c="8"/>User.java</text:p>
      <text:p text:style-name="Standard"><text:s text:c="8"/>UserRepository.java</text:p>
      <text:p text:style-name="Standard"><text:s text:c="8"/>UserService.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0:08:15.933967966</meta:creation-date>
    <dc:date>2026-07-07T10:16:50.451875275</dc:date>
    <meta:editing-duration>PT8M35S</meta:editing-duration>
    <meta:editing-cycles>1</meta:editing-cycles>
    <meta:document-statistic meta:table-count="0" meta:image-count="0" meta:object-count="0" meta:page-count="2" meta:paragraph-count="61" meta:word-count="175" meta:character-count="1886" meta:non-whitespace-character-count="1540"/>
    <meta:generator>LibreOffice/7.3.7.2$Linux_X86_64 LibreOffice_project/30$Build-2</meta:generator>
  </office:meta>
</office:document-meta>
</file>