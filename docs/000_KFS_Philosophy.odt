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070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kfs-philosophy"/>KFS Philosophy</text:h>
      <text:p text:style-name="Text_20_body"/>
      <text:p text:style-name="Text_20_body"/>
      <text:p text:style-name="Text_20_body"><text:span text:style-name="Strong_20_Emphasis">KFS Philosophy </text:span><text:span text:style-name="Strong_20_Emphasis"><text:span text:style-name="T3">Abstract</text:span></text:span></text:p>
      <text:p text:style-name="Text_20_body">Knowledge is more valuable than information.</text:p>
      <text:p text:style-name="Text_20_body">Information is collected.</text:p>
      <text:p text:style-name="Text_20_body">Knowledge is organized, connected, refined, and preserved.</text:p>
      <text:p text:style-name="Text_20_body">KFS exists to help individuals capture their experiences, organize their understanding, and build a lasting body of knowledge that grows over time. The software should adapt to the user's way of thinking, rather than forcing the user to adapt to the software.</text:p>
      <text:p text:style-name="Text_20_body"/>
      <text:p text:style-name="Text_20_body"/>
      <text:h text:style-name="Heading_20_2" text:outline-level="2"><text:bookmark-start text:name="purpose"/>Purpose</text:h>
      <text:p text:style-name="First_20_Paragraph">KFS (Karabelas File System) exists as both a software development exercise and an experiment in using artificial intelligence to assist in the design and implementation of a modern knowledge management system.</text:p>
      <text:p text:style-name="Text_20_body">Its purpose is not merely to store information, but to help individuals capture, organize, connect, refine, and preserve knowledge over time.</text:p>
      <text:p text:style-name="Standard"><draw:rect text:anchor-type="as-char" style:rel-width="100%" draw:z-index="0" draw:style-name="gr1" draw:text-style-name="P1" svg:width="6.5004in" svg:height="0.0213in"><text:p/></draw:rect><text:bookmark-end text:name="purpose"/></text:p>
      <text:h text:style-name="Heading_20_2" text:outline-level="2"><text:bookmark-start text:name="our-belief"/>Our Belief</text:h>
      <text:p text:style-name="First_20_Paragraph">Information has value.</text:p>
      <text:p text:style-name="Text_20_body">Knowledge has greater value.</text:p>
      <text:p text:style-name="Text_20_body">Information is simply collected.</text:p>
      <text:p text:style-name="Text_20_body">Knowledge is organized, understood, connected to other ideas, and refined through experience.</text:p>
      <text:p text:style-name="Text_20_body">KFS is designed to support that progression.</text:p>
      <text:p text:style-name="Standard"><draw:rect text:anchor-type="as-char" style:rel-width="100%" draw:z-index="1" draw:style-name="gr1" draw:text-style-name="P1" svg:width="6.5004in" svg:height="0.0213in"><text:p/></draw:rect><text:bookmark-end text:name="our-belief"/></text:p>
      <text:h text:style-name="Heading_20_2" text:outline-level="2"><text:bookmark-start text:name="our-principles"/><text:soft-page-break/>Our Principles</text:h>
      <text:h text:style-name="Heading_20_3" text:outline-level="3"><text:bookmark-start text:name="knowledge-belongs-to-the-user."/>Knowledge belongs to the user.</text:h>
      <text:p text:style-name="First_20_Paragraph">The user is the author, owner, and steward of their knowledge. KFS exists to serve the user, never to replace them.<text:bookmark-end text:name="knowledge-belongs-to-the-user."/></text:p>
      <text:h text:style-name="Heading_20_3" text:outline-level="3"><text:bookmark-start text:name="capture-should-be-effortless."/>Capture should be effortless.</text:h>
      <text:p text:style-name="First_20_Paragraph">Knowledge should never be lost because organization is incomplete.</text:p>
      <text:p text:style-name="Text_20_body">The system should make it easy to record an idea immediately and organize it when the time is right.<text:bookmark-end text:name="capture-should-be-effortless."/></text:p>
      <text:h text:style-name="Heading_20_3" text:outline-level="3"><text:bookmark-start text:name="organization-evolves."/>Organization evolves.</text:h>
      <text:p text:style-name="First_20_Paragraph">Knowledge rarely begins perfectly organized.</text:p>
      <text:p text:style-name="Text_20_body">As understanding grows, the structure of a Knowledge Base should be free to evolve without requiring the knowledge itself to change.<text:bookmark-end text:name="organization-evolves."/></text:p>
      <text:h text:style-name="Heading_20_3" text:outline-level="3"><text:bookmark-start text:name="the-tree-provides-structure."/>The tree provides structure.</text:h>
      <text:p text:style-name="First_20_Paragraph">Knowledge Bases are independent trees within a user’s forest of knowledge.</text:p>
      <text:p text:style-name="Text_20_body">Nodes organize knowledge into meaningful hierarchies that reflect the user’s understanding of a subject.<text:bookmark-end text:name="the-tree-provides-structure."/></text:p>
      <text:h text:style-name="Heading_20_3" text:outline-level="3"><text:bookmark-start text:name="relationships-create-understanding."/>Relationships create understanding.</text:h>
      <text:p text:style-name="First_20_Paragraph">Hierarchy answers the question:</text:p>
      <text:p text:style-name="Text_20_body"><text:span text:style-name="T1">“Where does this belong?”</text:span></text:p>
      <text:p text:style-name="Text_20_body">Relationships answer the question:</text:p>
      <text:p text:style-name="Text_20_body"><text:span text:style-name="T1">“How is this connected?”</text:span></text:p>
      <text:p text:style-name="Text_20_body">Together they transform isolated information into a connected body of knowledge.<text:bookmark-end text:name="relationships-create-understanding."/></text:p>
      <text:h text:style-name="Heading_20_3" text:outline-level="3"><text:bookmark-start text:name="artificial-intelligence-is-an-assistant."/>Artificial Intelligence is an assistant.</text:h>
      <text:p text:style-name="First_20_Paragraph">AI may summarize, suggest, classify, search, and discover relationships.</text:p>
      <text:p text:style-name="Text_20_body">AI does not own knowledge, replace human judgment, or become the authoritative source of truth.</text:p>
      <text:p text:style-name="Text_20_body">The final authority always remains with the user.<text:bookmark-end text:name="artificial-intelligence-is-an-assistant."/></text:p>
      <text:h text:style-name="Heading_20_3" text:outline-level="3"><text:bookmark-start text:name="simplicity-over-complexity."/><text:soft-page-break/>Simplicity over complexity.</text:h>
      <text:p text:style-name="First_20_Paragraph">The domain model should remain as simple as possible while supporting future growth.</text:p>
      <text:p text:style-name="Text_20_body">Specialized capabilities should extend the core model rather than complicate it.<text:bookmark-end text:name="simplicity-over-complexity."/></text:p>
      <text:h text:style-name="Heading_20_3" text:outline-level="3"><text:bookmark-start text:name="design-before-implementation."/>Design before implementation.</text:h>
      <text:p text:style-name="First_20_Paragraph">Architecture should be guided by the domain, not by the database, framework, or programming language.</text:p>
      <text:p text:style-name="Text_20_body">Technology serves the design—not the other way around.</text:p>
      <text:p text:style-name="Standard"><draw:rect text:anchor-type="as-char" style:rel-width="100%" draw:z-index="2" draw:style-name="gr1" draw:text-style-name="P1" svg:width="6.5004in" svg:height="0.0213in"><text:p/></draw:rect><text:bookmark-end text:name="design-before-implementation."/><text:bookmark-end text:name="our-principles"/></text:p>
      <text:h text:style-name="Heading_20_2" text:outline-level="2"><text:bookmark-start text:name="our-goal"/>Our Goal</text:h>
      <text:p text:style-name="First_20_Paragraph">KFS is intended to become more than a repository of notes.</text:p>
      <text:p text:style-name="Text_20_body">It is a personal, lifelong knowledge management system that grows with its user.</text:p>
      <text:p text:style-name="Text_20_body">Each Knowledge Base represents a living tree.</text:p>
      <text:p text:style-name="Text_20_body">Together, those trees become a forest that reflects a lifetime of learning, experience, curiosity, and discovery.</text:p>
      <text:p text:style-name="Standard"><draw:rect text:anchor-type="as-char" style:rel-width="100%" draw:z-index="3" draw:style-name="gr1" draw:text-style-name="P1" svg:width="6.5004in" svg:height="0.0213in"><text:p/></draw:rect><text:bookmark-end text:name="our-goal"/></text:p>
      <text:h text:style-name="Heading_20_2" text:outline-level="2"><text:bookmark-start text:name="guiding-question"/>Guiding Question</text:h>
      <text:p text:style-name="First_20_Paragraph">Whenever a design decision is made, we should ask a single question:</text:p>
      <text:p text:style-name="Block_20_Text"><text:span text:style-name="T2">Does this help the user build, organize, connect, and preserve knowledge?</text:span></text:p>
      <text:p text:style-name="First_20_Paragraph">If the answer is yes, the design is moving in the right direction.<text:bookmark-end text:name="guiding-question"/><text:bookmark-end text:name="kfs-philosophy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2:36:42</meta:creation-date>
    <dc:date>2026-07-06T08:46:20.440627610</dc:date>
    <meta:generator>LibreOffice/7.3.7.2$Linux_X86_64 LibreOffice_project/30$Build-2</meta:generator>
    <meta:editing-duration>PT15M26S</meta:editing-duration>
    <meta:editing-cycles>1</meta:editing-cycles>
    <meta:document-statistic meta:table-count="0" meta:image-count="0" meta:object-count="0" meta:page-count="3" meta:paragraph-count="56" meta:word-count="473" meta:character-count="3153" meta:non-whitespace-character-count="2733"/>
    <meta:user-defined meta:name="AppVersion">12.0000</meta:user-defined>
    <meta:template xlink:type="simple" xlink:actuate="onRequest" xlink:title="Normal.dotm" xlink:href=""/>
  </office:meta>
</office:document-meta>
</file>